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adea" svg:font-family="Calade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text-properties fo:color="#000000" loext:opacity="100%" style:font-name="Caladea"/>
    </style:style>
    <style:style style:name="P2" style:family="paragraph" style:parent-style-name="Text_20_body">
      <style:text-properties fo:color="#000000" loext:opacity="100%" style:font-name="Caladea"/>
    </style:style>
    <style:style style:name="P3" style:family="paragraph" style:parent-style-name="Compact" style:list-style-name="WWNum1001">
      <style:text-properties fo:color="#000000" loext:opacity="100%" style:font-name="Caladea"/>
    </style:style>
    <style:style style:name="P4" style:family="paragraph" style:parent-style-name="First_20_Paragraph">
      <style:text-properties fo:color="#000000" loext:opacity="100%" style:font-name="Caladea"/>
    </style:style>
    <style:style style:name="P5" style:family="paragraph" style:parent-style-name="Standard">
      <style:text-properties fo:color="#000000" loext:opacity="100%" style:font-name="Caladea"/>
    </style:style>
    <style:style style:name="P6" style:family="paragraph" style:parent-style-name="Compact" style:list-style-name="WWNum1002"/>
    <style:style style:name="P7" style:family="paragraph" style:parent-style-name="Compact" style:list-style-name="WWNum1002">
      <style:text-properties fo:color="#000000" loext:opacity="100%" style:font-name="Caladea"/>
    </style:style>
    <style:style style:name="P8" style:family="paragraph" style:parent-style-name="Compact" style:list-style-name="WWNum1003">
      <style:text-properties fo:color="#000000" loext:opacity="100%" style:font-name="Caladea"/>
    </style:style>
    <style:style style:name="P9" style:family="paragraph" style:parent-style-name="Heading_20_2">
      <style:text-properties fo:color="#000000" loext:opacity="100%" style:font-name="Caladea"/>
    </style:style>
    <style:style style:name="P10" style:family="paragraph" style:parent-style-name="Compact" style:list-style-name="WWNum1004"/>
    <style:style style:name="P11" style:family="paragraph" style:parent-style-name="Compact" style:list-style-name="WWNum1004">
      <style:text-properties fo:color="#000000" loext:opacity="100%" style:font-name="Caladea"/>
    </style:style>
    <style:style style:name="P12" style:family="paragraph" style:parent-style-name="Compact" style:list-style-name="WWNum1005">
      <style:text-properties fo:color="#000000" loext:opacity="100%" style:font-name="Caladea"/>
    </style:style>
    <style:style style:name="P13" style:family="paragraph" style:parent-style-name="Compact" style:list-style-name="WWNum1006">
      <style:text-properties fo:color="#000000" loext:opacity="100%" style:font-name="Caladea"/>
    </style:style>
    <style:style style:name="P14" style:family="paragraph" style:parent-style-name="Compact" style:list-style-name="WWNum1007">
      <style:text-properties fo:color="#000000" loext:opacity="100%" style:font-name="Caladea"/>
    </style:style>
    <style:style style:name="P15" style:family="paragraph" style:parent-style-name="Compact" style:list-style-name="WWNum1008">
      <style:text-properties fo:color="#000000" loext:opacity="100%" style:font-name="Caladea"/>
    </style:style>
    <style:style style:name="P16" style:family="paragraph" style:parent-style-name="Compact" style:list-style-name="WWNum1009">
      <style:text-properties fo:color="#000000" loext:opacity="100%" style:font-name="Caladea"/>
    </style:style>
    <style:style style:name="P17" style:family="paragraph" style:parent-style-name="Compact" style:list-style-name="WWNum1010">
      <style:text-properties fo:color="#000000" loext:opacity="100%" style:font-name="Caladea"/>
    </style:style>
    <style:style style:name="P18" style:family="paragraph" style:parent-style-name="Heading_20_3">
      <style:text-properties fo:color="#000000" loext:opacity="100%" style:font-name="Caladea"/>
    </style:style>
    <style:style style:name="P19" style:family="paragraph" style:parent-style-name="Compact" style:list-style-name="WWNum1011">
      <style:text-properties fo:color="#000000" loext:opacity="100%" style:font-name="Caladea"/>
    </style:style>
    <style:style style:name="P20" style:family="paragraph" style:parent-style-name="Compact" style:list-style-name="WWNum1012">
      <style:text-properties fo:color="#000000" loext:opacity="100%" style:font-name="Caladea"/>
    </style:style>
    <style:style style:name="P21" style:family="paragraph" style:parent-style-name="Compact" style:list-style-name="WWNum1013">
      <style:text-properties fo:color="#000000" loext:opacity="100%" style:font-name="Caladea"/>
    </style:style>
    <style:style style:name="P22" style:family="paragraph" style:parent-style-name="Compact" style:list-style-name="WWNum1014">
      <style:text-properties fo:color="#000000" loext:opacity="100%" style:font-name="Caladea"/>
    </style:style>
    <style:style style:name="P23" style:family="paragraph" style:parent-style-name="Compact" style:list-style-name="WWNum1015">
      <style:text-properties fo:color="#000000" loext:opacity="100%" style:font-name="Caladea"/>
    </style:style>
    <style:style style:name="P24" style:family="paragraph" style:parent-style-name="Compact" style:list-style-name="WWNum1016">
      <style:text-properties fo:color="#000000" loext:opacity="100%" style:font-name="Caladea"/>
    </style:style>
    <style:style style:name="P25" style:family="paragraph" style:parent-style-name="Compact" style:list-style-name="WWNum1017">
      <style:text-properties fo:color="#000000" loext:opacity="100%" style:font-name="Caladea"/>
    </style:style>
    <style:style style:name="P26" style:family="paragraph" style:parent-style-name="Compact" style:list-style-name="WWNum1018">
      <style:text-properties fo:color="#000000" loext:opacity="100%" style:font-name="Caladea"/>
    </style:style>
    <style:style style:name="P27" style:family="paragraph" style:parent-style-name="Compact" style:list-style-name="WWNum1019">
      <style:text-properties fo:color="#000000" loext:opacity="100%" style:font-name="Calad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Calad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licación-del-proyecto-web-techflow"/>Explicación del Proyecto Web: TechFlow</text:h>
      <text:h text:style-name="Heading_20_2" text:outline-level="2"><text:bookmark-start text:name="introducción"/>Introducción</text:h>
      <text:p text:style-name="First_20_Paragraph">La página web <text:span text:style-name="T1">TechFlow</text:span> es un proyecto desarrollado con <text:span text:style-name="T1">HTML, CSS y JavaScript</text:span> que implementa múltiples funcionalidades modernas de desarrollo frontend. El objetivo de la página es simular una tienda tecnológica con efectos visuales modernos, formularios interactivos, carrito de compras y elementos dinámicos.</text:p>
      <text:p text:style-name="Standard"><text:bookmark-end text:name="explicación-del-proyecto-web-techflow"/><text:bookmark-end text:name="introducción"/></text:p>
      <text:h text:style-name="P1" text:outline-level="1"><text:bookmark-start text:name="estructura-general-del-html"/>1. Estructura General del HTML</text:h>
      <text:p text:style-name="First_20_Paragraph"><text:span text:style-name="T2">El archivo </text:span><text:span text:style-name="Verbatim_20_Char"><text:span text:style-name="T2">index.html</text:span></text:span><text:span text:style-name="T2"> contiene toda la estructura principal de la página.</text:span></text:p>
      <text:p text:style-name="P2">Las secciones más importantes son:</text:p>
      <text:list xml:id="list1446195371" text:style-name="WWNum1001">
        <text:list-item>
          <text:p text:style-name="P3">Barra de navegación (Navbar)</text:p>
        </text:list-item>
        <text:list-item>
          <text:p text:style-name="P3">Hero Section</text:p>
        </text:list-item>
        <text:list-item>
          <text:p text:style-name="P3">Sistema de pestañas (Tabs)</text:p>
        </text:list-item>
        <text:list-item>
          <text:p text:style-name="P3">Productos</text:p>
        </text:list-item>
        <text:list-item>
          <text:p text:style-name="P3">Lightbox</text:p>
        </text:list-item>
        <text:list-item>
          <text:p text:style-name="P3">Formulario de contacto</text:p>
        </text:list-item>
        <text:list-item>
          <text:p text:style-name="P3">Noticias con scroll infinito</text:p>
        </text:list-item>
        <text:list-item>
          <text:p text:style-name="P3">Footer</text:p>
        </text:list-item>
      </text:list>
      <text:p text:style-name="P4">La estructura usa etiquetas semánticas como:</text:p>
      <text:p text:style-name="Source_20_Code"><text:span text:style-name="DataTypeTok"><text:span text:style-name="T2">&lt;</text:span></text:span><text:span text:style-name="KeywordTok"><text:span text:style-name="T2">nav</text:span></text:span><text:span text:style-name="DataTypeTok"><text:span text:style-name="T2">&gt;</text:span></text:span><text:span text:style-name="T2"><text:line-break/></text:span><text:span text:style-name="DataTypeTok"><text:span text:style-name="T2">&lt;</text:span></text:span><text:span text:style-name="KeywordTok"><text:span text:style-name="T2">section</text:span></text:span><text:span text:style-name="DataTypeTok"><text:span text:style-name="T2">&gt;</text:span></text:span><text:span text:style-name="T2"><text:line-break/></text:span><text:span text:style-name="DataTypeTok"><text:span text:style-name="T2">&lt;</text:span></text:span><text:span text:style-name="KeywordTok"><text:span text:style-name="T2">header</text:span></text:span><text:span text:style-name="DataTypeTok"><text:span text:style-name="T2">&gt;</text:span></text:span><text:span text:style-name="T2"><text:line-break/></text:span><text:span text:style-name="DataTypeTok"><text:span text:style-name="T2">&lt;</text:span></text:span><text:span text:style-name="KeywordTok"><text:span text:style-name="T2">footer</text:span></text:span><text:span text:style-name="DataTypeTok"><text:span text:style-name="T2">&gt;</text:span></text:span><text:span text:style-name="T2"><text:line-break/></text:span><text:span text:style-name="DataTypeTok"><text:span text:style-name="T2">&lt;</text:span></text:span><text:span text:style-name="KeywordTok"><text:span text:style-name="T2">form</text:span></text:span><text:span text:style-name="DataTypeTok"><text:span text:style-name="T2">&gt;</text:span></text:span></text:p>
      <text:p text:style-name="P4">Esto mejora la organización del código y facilita la accesibilidad.</text:p>
      <text:p text:style-name="P5"><text:bookmark-end text:name="estructura-general-del-html"/></text:p>
      <text:h text:style-name="P1" text:outline-level="1"><text:bookmark-start text:name="barra-de-navegación-navbar"/>2. Barra de Navegación (Navbar)</text:h>
      <text:p text:style-name="First_20_Paragraph"><text:span text:style-name="T2">La barra de navegación utiliza la clase </text:span><text:span text:style-name="Verbatim_20_Char"><text:span text:style-name="T2">.navbar</text:span></text:span><text:span text:style-name="T2">.</text:span></text:p>
      <text:p text:style-name="P2">Características principales:</text:p>
      <text:list xml:id="list93710308709827" text:continue-list="list1446195371" text:style-name="WWNum1002">
        <text:list-item>
          <text:p text:style-name="P6"><text:soft-page-break/><text:span text:style-name="T2">Permanece fija usando </text:span><text:span text:style-name="Verbatim_20_Char"><text:span text:style-name="T2">position: sticky</text:span></text:span></text:p>
        </text:list-item>
        <text:list-item>
          <text:p text:style-name="P7">Contiene enlaces de navegación</text:p>
        </text:list-item>
        <text:list-item>
          <text:p text:style-name="P7">Incluye un reloj digital</text:p>
        </text:list-item>
        <text:list-item>
          <text:p text:style-name="P7">Tiene botones para Login y Carrito</text:p>
        </text:list-item>
      </text:list>
      <text:p text:style-name="P4">Código importante:</text:p>
      <text:p text:style-name="Source_20_Code"><text:span text:style-name="FunctionTok"><text:span text:style-name="T2">.navbar</text:span></text:span><text:span text:style-name="NormalTok"><text:span text:style-name="T2"> {</text:span></text:span><text:span text:style-name="T2"><text:line-break/></text:span><text:span text:style-name="NormalTok"><text:span text:style-name="T2"> <text:s text:c="3"/></text:span></text:span><text:span text:style-name="KeywordTok"><text:span text:style-name="T2">position</text:span></text:span><text:span text:style-name="CharTok"><text:span text:style-name="T2">:</text:span></text:span><text:span text:style-name="NormalTok"><text:span text:style-name="T2"> </text:span></text:span><text:span text:style-name="DecValTok"><text:span text:style-name="T2">sticky</text:span></text:span><text:span text:style-name="OperatorTok"><text:span text:style-name="T2">;</text:span></text:span><text:span text:style-name="T2"><text:line-break/></text:span><text:span text:style-name="NormalTok"><text:span text:style-name="T2"> <text:s text:c="3"/></text:span></text:span><text:span text:style-name="KeywordTok"><text:span text:style-name="T2">top</text:span></text:span><text:span text:style-name="CharTok"><text:span text:style-name="T2">:</text:span></text:span><text:span text:style-name="NormalTok"><text:span text:style-name="T2"> </text:span></text:span><text:span text:style-name="DecValTok"><text:span text:style-name="T2">0</text:span></text:span><text:span text:style-name="OperatorTok"><text:span text:style-name="T2">;</text:span></text:span><text:span text:style-name="T2"><text:line-break/></text:span><text:span text:style-name="NormalTok"><text:span text:style-name="T2">}</text:span></text:span></text:p>
      <text:p text:style-name="P4">Esto hace que la barra permanezca visible mientras el usuario hace scroll.</text:p>
      <text:p text:style-name="P5"><text:bookmark-end text:name="barra-de-navegación-navbar"/></text:p>
      <text:h text:style-name="P1" text:outline-level="1"><text:bookmark-start text:name="hero-section-y-animaciones"/>3. Hero Section y Animaciones</text:h>
      <text:p text:style-name="P4">La Hero Section es la primera sección visual de la página.</text:p>
      <text:p text:style-name="P2">Contiene:</text:p>
      <text:list xml:id="list93710039356096" text:continue-list="list93710308709827" text:style-name="WWNum1003">
        <text:list-item>
          <text:p text:style-name="P8">Un título principal</text:p>
        </text:list-item>
        <text:list-item>
          <text:p text:style-name="P8">Texto descriptivo</text:p>
        </text:list-item>
        <text:list-item>
          <text:p text:style-name="P8">Botón de acción</text:p>
        </text:list-item>
      </text:list>
      <text:p text:style-name="P4">Se utilizan animaciones CSS mediante:</text:p>
      <text:p text:style-name="Source_20_Code"><text:span text:style-name="NormalTok"><text:span text:style-name="T2">transform</text:span></text:span><text:span text:style-name="T2"><text:line-break/></text:span><text:span text:style-name="NormalTok"><text:span text:style-name="T2">transition</text:span></text:span><text:span text:style-name="T2"><text:line-break/></text:span><text:span text:style-name="ImportTok"><text:span text:style-name="T2">@keyframes</text:span></text:span></text:p>
      <text:p text:style-name="First_20_Paragraph"><text:span text:style-name="T2">La clase </text:span><text:span text:style-name="Verbatim_20_Char"><text:span text:style-name="T2">.sliding-text</text:span></text:span><text:span text:style-name="T2"> mueve el texto desde la derecha:</text:span></text:p>
      <text:p text:style-name="Source_20_Code"><text:span text:style-name="FunctionTok"><text:span text:style-name="T2">.hero-content</text:span></text:span><text:span text:style-name="NormalTok"><text:span text:style-name="T2"> h1</text:span></text:span><text:span text:style-name="FunctionTok"><text:span text:style-name="T2">.sliding-text</text:span></text:span><text:span text:style-name="NormalTok"><text:span text:style-name="T2"> {</text:span></text:span><text:span text:style-name="T2"><text:line-break/></text:span><text:span text:style-name="NormalTok"><text:span text:style-name="T2"> <text:s text:c="3"/></text:span></text:span><text:span text:style-name="KeywordTok"><text:span text:style-name="T2">transform</text:span></text:span><text:span text:style-name="CharTok"><text:span text:style-name="T2">:</text:span></text:span><text:span text:style-name="NormalTok"><text:span text:style-name="T2"> </text:span></text:span><text:span text:style-name="FunctionTok"><text:span text:style-name="T2">translateX(</text:span></text:span><text:span text:style-name="DecValTok"><text:span text:style-name="T2">100</text:span></text:span><text:span text:style-name="DataTypeTok"><text:span text:style-name="T2">px</text:span></text:span><text:span text:style-name="FunctionTok"><text:span text:style-name="T2">)</text:span></text:span><text:span text:style-name="OperatorTok"><text:span text:style-name="T2">;</text:span></text:span><text:span text:style-name="T2"><text:line-break/></text:span><text:span text:style-name="NormalTok"><text:span text:style-name="T2">}</text:span></text:span></text:p>
      <text:p text:style-name="P4">Cuando el usuario pasa el cursor:</text:p>
      <text:p text:style-name="Source_20_Code"><text:span text:style-name="FunctionTok"><text:span text:style-name="T2">.hero-content</text:span></text:span><text:span text:style-name="NormalTok"><text:span text:style-name="T2"> h1</text:span></text:span><text:span text:style-name="FunctionTok"><text:span text:style-name="T2">.sliding-text</text:span></text:span><text:span text:style-name="InformationTok"><text:span text:style-name="T2">:hover</text:span></text:span><text:span text:style-name="NormalTok"><text:span text:style-name="T2"> {</text:span></text:span><text:span text:style-name="T2"><text:line-break/></text:span><text:span text:style-name="NormalTok"><text:span text:style-name="T2"> <text:s text:c="3"/></text:span></text:span><text:span text:style-name="KeywordTok"><text:span text:style-name="T2">transform</text:span></text:span><text:span text:style-name="CharTok"><text:span text:style-name="T2">:</text:span></text:span><text:span text:style-name="NormalTok"><text:span text:style-name="T2"> </text:span></text:span><text:span text:style-name="FunctionTok"><text:span text:style-name="T2">translateX(</text:span></text:span><text:span text:style-name="DecValTok"><text:span text:style-name="T2">0</text:span></text:span><text:span text:style-name="FunctionTok"><text:span text:style-name="T2">)</text:span></text:span><text:span text:style-name="OperatorTok"><text:span text:style-name="T2">;</text:span></text:span><text:span text:style-name="T2"><text:line-break/></text:span><text:span text:style-name="NormalTok"><text:span text:style-name="T2">}</text:span></text:span></text:p>
      <text:p text:style-name="P5"><text:bookmark-end text:name="hero-section-y-animaciones"/></text:p>
      <text:h text:style-name="P1" text:outline-level="1"><text:bookmark-start text:name="sistema-de-pestañas-tabs"/>4. Sistema de Pestañas (Tabs)</text:h>
      <text:p text:style-name="P4">El sistema de pestañas permite cambiar contenido dinámicamente sin recargar la página.</text:p>
      <text:h text:style-name="P9" text:outline-level="2"><text:bookmark-start text:name="html"/><text:soft-page-break/>HTML</text:h>
      <text:p text:style-name="First_20_Paragraph"><text:span text:style-name="T2">Cada botón posee un atributo </text:span><text:span text:style-name="Verbatim_20_Char"><text:span text:style-name="T2">data-tab</text:span></text:span><text:span text:style-name="T2">:</text:span></text:p>
      <text:p text:style-name="Source_20_Code"><text:span text:style-name="DataTypeTok"><text:span text:style-name="T2">&lt;</text:span></text:span><text:span text:style-name="KeywordTok"><text:span text:style-name="T2">button</text:span></text:span><text:span text:style-name="OtherTok"><text:span text:style-name="T2"> class</text:span></text:span><text:span text:style-name="OperatorTok"><text:span text:style-name="T2">=</text:span></text:span><text:span text:style-name="StringTok"><text:span text:style-name="T2">"tab-btn"</text:span></text:span><text:span text:style-name="OtherTok"><text:span text:style-name="T2"> data-tab</text:span></text:span><text:span text:style-name="OperatorTok"><text:span text:style-name="T2">=</text:span></text:span><text:span text:style-name="StringTok"><text:span text:style-name="T2">"tab-about"</text:span></text:span><text:span text:style-name="DataTypeTok"><text:span text:style-name="T2">&gt;</text:span></text:span></text:p>
      <text:p text:style-name="First_20_Paragraph"><text:span text:style-name="T2">Cada contenido tiene un </text:span><text:span text:style-name="Verbatim_20_Char"><text:span text:style-name="T2">id</text:span></text:span><text:span text:style-name="T2"> correspondiente:</text:span></text:p>
      <text:p text:style-name="Source_20_Code"><text:span text:style-name="DataTypeTok"><text:span text:style-name="T2">&lt;</text:span></text:span><text:span text:style-name="KeywordTok"><text:span text:style-name="T2">div</text:span></text:span><text:span text:style-name="OtherTok"><text:span text:style-name="T2"> id</text:span></text:span><text:span text:style-name="OperatorTok"><text:span text:style-name="T2">=</text:span></text:span><text:span text:style-name="StringTok"><text:span text:style-name="T2">"tab-about"</text:span></text:span><text:span text:style-name="OtherTok"><text:span text:style-name="T2"> class</text:span></text:span><text:span text:style-name="OperatorTok"><text:span text:style-name="T2">=</text:span></text:span><text:span text:style-name="StringTok"><text:span text:style-name="T2">"tab-pane"</text:span></text:span><text:span text:style-name="DataTypeTok"><text:span text:style-name="T2">&gt;</text:span></text:span><text:bookmark-end text:name="html"/></text:p>
      <text:h text:style-name="P9" text:outline-level="2"><text:bookmark-start text:name="javascript"/>JavaScript</text:h>
      <text:p text:style-name="P4">El script detecta el clic:</text:p>
      <text:p text:style-name="Source_20_Code"><text:span text:style-name="NormalTok"><text:span text:style-name="T2">btn</text:span></text:span><text:span text:style-name="OperatorTok"><text:span text:style-name="T2">.</text:span></text:span><text:span text:style-name="FunctionTok"><text:span text:style-name="T2">addEventListener</text:span></text:span><text:span text:style-name="NormalTok"><text:span text:style-name="T2">(</text:span></text:span><text:span text:style-name="StringTok"><text:span text:style-name="T2">'click'</text:span></text:span><text:span text:style-name="OperatorTok"><text:span text:style-name="T2">,</text:span></text:span><text:span text:style-name="NormalTok"><text:span text:style-name="T2"> () </text:span></text:span><text:span text:style-name="KeywordTok"><text:span text:style-name="T2">=&gt;</text:span></text:span><text:span text:style-name="NormalTok"><text:span text:style-name="T2"> {</text:span></text:span></text:p>
      <text:p text:style-name="P4">Luego:</text:p>
      <text:list xml:id="list93708644949103" text:continue-list="list93710039356096" text:style-name="WWNum1004">
        <text:list-item>
          <text:p text:style-name="P10"><text:span text:style-name="T2">Remueve la clase </text:span><text:span text:style-name="Verbatim_20_Char"><text:span text:style-name="T2">active</text:span></text:span></text:p>
        </text:list-item>
        <text:list-item>
          <text:p text:style-name="P10"><text:span text:style-name="T2">Agrega </text:span><text:span text:style-name="Verbatim_20_Char"><text:span text:style-name="T2">active</text:span></text:span><text:span text:style-name="T2"> al botón seleccionado</text:span></text:p>
        </text:list-item>
        <text:list-item>
          <text:p text:style-name="P11">Muestra el contenido correcto</text:p>
        </text:list-item>
      </text:list>
      <text:p text:style-name="P4">Código:</text:p>
      <text:p text:style-name="Source_20_Code"><text:span text:style-name="KeywordTok"><text:span text:style-name="T2">const</text:span></text:span><text:span text:style-name="NormalTok"><text:span text:style-name="T2"> targetId </text:span></text:span><text:span text:style-name="OperatorTok"><text:span text:style-name="T2">=</text:span></text:span><text:span text:style-name="NormalTok"><text:span text:style-name="T2"> btn</text:span></text:span><text:span text:style-name="OperatorTok"><text:span text:style-name="T2">.</text:span></text:span><text:span text:style-name="FunctionTok"><text:span text:style-name="T2">getAttribute</text:span></text:span><text:span text:style-name="NormalTok"><text:span text:style-name="T2">(</text:span></text:span><text:span text:style-name="StringTok"><text:span text:style-name="T2">'data-tab'</text:span></text:span><text:span text:style-name="NormalTok"><text:span text:style-name="T2">)</text:span></text:span><text:span text:style-name="OperatorTok"><text:span text:style-name="T2">;</text:span></text:span><text:span text:style-name="T2"><text:line-break/></text:span><text:span text:style-name="BuiltInTok"><text:span text:style-name="T2">document</text:span></text:span><text:span text:style-name="OperatorTok"><text:span text:style-name="T2">.</text:span></text:span><text:span text:style-name="FunctionTok"><text:span text:style-name="T2">getElementById</text:span></text:span><text:span text:style-name="NormalTok"><text:span text:style-name="T2">(targetId)</text:span></text:span><text:span text:style-name="OperatorTok"><text:span text:style-name="T2">.</text:span></text:span><text:span text:style-name="AttributeTok"><text:span text:style-name="T2">classList</text:span></text:span><text:span text:style-name="OperatorTok"><text:span text:style-name="T2">.</text:span></text:span><text:span text:style-name="FunctionTok"><text:span text:style-name="T2">add</text:span></text:span><text:span text:style-name="NormalTok"><text:span text:style-name="T2">(</text:span></text:span><text:span text:style-name="StringTok"><text:span text:style-name="T2">'active'</text:span></text:span><text:span text:style-name="NormalTok"><text:span text:style-name="T2">)</text:span></text:span><text:span text:style-name="OperatorTok"><text:span text:style-name="T2">;</text:span></text:span></text:p>
      <text:p text:style-name="P5"><text:bookmark-end text:name="sistema-de-pestañas-tabs"/><text:bookmark-end text:name="javascript"/></text:p>
      <text:h text:style-name="P1" text:outline-level="1"><text:bookmark-start text:name="lightbox-caja-de-luz"/>5. Lightbox (Caja de Luz)</text:h>
      <text:p text:style-name="P4">El Lightbox permite ampliar imágenes.</text:p>
      <text:h text:style-name="P9" text:outline-level="2"><text:bookmark-start text:name="funcionamiento"/>Funcionamiento</text:h>
      <text:p text:style-name="P4">Cuando el usuario hace clic sobre una imagen:</text:p>
      <text:p text:style-name="Source_20_Code"><text:span text:style-name="NormalTok"><text:span text:style-name="T2">img</text:span></text:span><text:span text:style-name="OperatorTok"><text:span text:style-name="T2">.</text:span></text:span><text:span text:style-name="FunctionTok"><text:span text:style-name="T2">addEventListener</text:span></text:span><text:span text:style-name="NormalTok"><text:span text:style-name="T2">(</text:span></text:span><text:span text:style-name="StringTok"><text:span text:style-name="T2">'click'</text:span></text:span><text:span text:style-name="OperatorTok"><text:span text:style-name="T2">,</text:span></text:span><text:span text:style-name="NormalTok"><text:span text:style-name="T2"> () </text:span></text:span><text:span text:style-name="KeywordTok"><text:span text:style-name="T2">=&gt;</text:span></text:span><text:span text:style-name="NormalTok"><text:span text:style-name="T2"> {</text:span></text:span></text:p>
      <text:p text:style-name="P4">El sistema:</text:p>
      <text:list xml:id="list93709271476459" text:continue-list="list93708644949103" text:style-name="WWNum1005">
        <text:list-item>
          <text:p text:style-name="P12">Obtiene una versión de mayor resolución</text:p>
        </text:list-item>
        <text:list-item>
          <text:p text:style-name="P12">Cambia la imagen del modal</text:p>
        </text:list-item>
        <text:list-item>
          <text:p text:style-name="P12">Muestra el Lightbox</text:p>
        </text:list-item>
      </text:list>
      <text:p text:style-name="P4">Código:</text:p>
      <text:p text:style-name="Source_20_Code"><text:span text:style-name="NormalTok"><text:span text:style-name="T2">lightbox</text:span></text:span><text:span text:style-name="OperatorTok"><text:span text:style-name="T2">.</text:span></text:span><text:span text:style-name="AttributeTok"><text:span text:style-name="T2">classList</text:span></text:span><text:span text:style-name="OperatorTok"><text:span text:style-name="T2">.</text:span></text:span><text:span text:style-name="FunctionTok"><text:span text:style-name="T2">add</text:span></text:span><text:span text:style-name="NormalTok"><text:span text:style-name="T2">(</text:span></text:span><text:span text:style-name="StringTok"><text:span text:style-name="T2">'active'</text:span></text:span><text:span text:style-name="NormalTok"><text:span text:style-name="T2">)</text:span></text:span><text:span text:style-name="OperatorTok"><text:span text:style-name="T2">;</text:span></text:span></text:p>
      <text:p text:style-name="P4">Para cerrar:</text:p>
      <text:p text:style-name="Source_20_Code"><text:span text:style-name="NormalTok"><text:span text:style-name="T2">lightbox</text:span></text:span><text:span text:style-name="OperatorTok"><text:span text:style-name="T2">.</text:span></text:span><text:span text:style-name="AttributeTok"><text:span text:style-name="T2">classList</text:span></text:span><text:span text:style-name="OperatorTok"><text:span text:style-name="T2">.</text:span></text:span><text:span text:style-name="FunctionTok"><text:span text:style-name="T2">remove</text:span></text:span><text:span text:style-name="NormalTok"><text:span text:style-name="T2">(</text:span></text:span><text:span text:style-name="StringTok"><text:span text:style-name="T2">'active'</text:span></text:span><text:span text:style-name="NormalTok"><text:span text:style-name="T2">)</text:span></text:span><text:span text:style-name="OperatorTok"><text:span text:style-name="T2">;</text:span></text:span></text:p>
      <text:p text:style-name="P4"><text:soft-page-break/>También puede cerrarse haciendo clic fuera de la imagen.</text:p>
      <text:p text:style-name="P5"><text:bookmark-end text:name="lightbox-caja-de-luz"/><text:bookmark-end text:name="funcionamiento"/></text:p>
      <text:h text:style-name="P1" text:outline-level="1"><text:bookmark-start text:name="modal-de-login"/>6. Modal de Login</text:h>
      <text:p text:style-name="P4">El Login utiliza una ventana modal.</text:p>
      <text:h text:style-name="P9" text:outline-level="2"><text:bookmark-start text:name="elementos-principales"/>Elementos principales</text:h>
      <text:list xml:id="list93710298094212" text:continue-list="list93709271476459" text:style-name="WWNum1006">
        <text:list-item>
          <text:p text:style-name="P13">Botón de abrir login</text:p>
        </text:list-item>
        <text:list-item>
          <text:p text:style-name="P13">Formulario</text:p>
        </text:list-item>
        <text:list-item>
          <text:p text:style-name="P13">Inputs de usuario y contraseña</text:p>
        </text:list-item>
        <text:list-item>
          <text:p text:style-name="P13">Mensajes de validación<text:bookmark-end text:name="elementos-principales"/></text:p>
        </text:list-item>
      </text:list>
      <text:h text:style-name="P9" text:outline-level="2"><text:bookmark-start text:name="validación"/>Validación</text:h>
      <text:p text:style-name="P4">La validación es hardcodeada:</text:p>
      <text:p text:style-name="Source_20_Code"><text:span text:style-name="ControlFlowTok"><text:span text:style-name="T2">if</text:span></text:span><text:span text:style-name="NormalTok"><text:span text:style-name="T2"> (user </text:span></text:span><text:span text:style-name="OperatorTok"><text:span text:style-name="T2">===</text:span></text:span><text:span text:style-name="NormalTok"><text:span text:style-name="T2"> </text:span></text:span><text:span text:style-name="StringTok"><text:span text:style-name="T2">'admin'</text:span></text:span><text:span text:style-name="NormalTok"><text:span text:style-name="T2"> </text:span></text:span><text:span text:style-name="OperatorTok"><text:span text:style-name="T2">&amp;&amp;</text:span></text:span><text:span text:style-name="NormalTok"><text:span text:style-name="T2"> pass </text:span></text:span><text:span text:style-name="OperatorTok"><text:span text:style-name="T2">===</text:span></text:span><text:span text:style-name="NormalTok"><text:span text:style-name="T2"> </text:span></text:span><text:span text:style-name="StringTok"><text:span text:style-name="T2">'1234'</text:span></text:span><text:span text:style-name="NormalTok"><text:span text:style-name="T2">)</text:span></text:span></text:p>
      <text:p text:style-name="P4">Si las credenciales son correctas:</text:p>
      <text:list xml:id="list93710330233047" text:continue-list="list93710298094212" text:style-name="WWNum1007">
        <text:list-item>
          <text:p text:style-name="P14">Se muestran clases de éxito</text:p>
        </text:list-item>
        <text:list-item>
          <text:p text:style-name="P14">Aparece mensaje positivo</text:p>
        </text:list-item>
        <text:list-item>
          <text:p text:style-name="P14">El botón cambia a “Mi Cuenta”</text:p>
        </text:list-item>
      </text:list>
      <text:p text:style-name="P4">Si son incorrectas:</text:p>
      <text:list xml:id="list93708830179877" text:continue-list="list93710330233047" text:style-name="WWNum1008">
        <text:list-item>
          <text:p text:style-name="P15">Se agregan clases de error</text:p>
        </text:list-item>
        <text:list-item>
          <text:p text:style-name="P15">Aparece mensaje negativo</text:p>
        </text:list-item>
      </text:list>
      <text:p text:style-name="P5"><text:bookmark-end text:name="modal-de-login"/><text:bookmark-end text:name="validación"/></text:p>
      <text:h text:style-name="P1" text:outline-level="1"><text:bookmark-start text:name="carrito-de-compras"/>7. Carrito de Compras</text:h>
      <text:p text:style-name="P4">El carrito funciona mediante un array llamado:</text:p>
      <text:p text:style-name="Source_20_Code"><text:span text:style-name="KeywordTok"><text:span text:style-name="T2">let</text:span></text:span><text:span text:style-name="NormalTok"><text:span text:style-name="T2"> cart </text:span></text:span><text:span text:style-name="OperatorTok"><text:span text:style-name="T2">=</text:span></text:span><text:span text:style-name="NormalTok"><text:span text:style-name="T2"> []</text:span></text:span><text:span text:style-name="OperatorTok"><text:span text:style-name="T2">;</text:span></text:span></text:p>
      <text:h text:style-name="P9" text:outline-level="2"><text:bookmark-start text:name="agregar-productos"/>Agregar productos</text:h>
      <text:p text:style-name="P4">Cada botón contiene atributos:</text:p>
      <text:p text:style-name="Source_20_Code"><text:span text:style-name="NormalTok"><text:span text:style-name="T2">data-id</text:span></text:span><text:span text:style-name="T2"><text:line-break/></text:span><text:span text:style-name="NormalTok"><text:span text:style-name="T2">data-name</text:span></text:span><text:span text:style-name="T2"><text:line-break/></text:span><text:span text:style-name="NormalTok"><text:span text:style-name="T2">data-price</text:span></text:span><text:span text:style-name="T2"><text:line-break/></text:span><text:span text:style-name="NormalTok"><text:span text:style-name="T2">data-img</text:span></text:span></text:p>
      <text:p text:style-name="P4">JavaScript crea un objeto:</text:p>
      <text:p text:style-name="Source_20_Code"><text:soft-page-break/><text:span text:style-name="KeywordTok"><text:span text:style-name="T2">const</text:span></text:span><text:span text:style-name="NormalTok"><text:span text:style-name="T2"> product </text:span></text:span><text:span text:style-name="OperatorTok"><text:span text:style-name="T2">=</text:span></text:span><text:span text:style-name="NormalTok"><text:span text:style-name="T2"> {</text:span></text:span><text:span text:style-name="T2"><text:line-break/></text:span><text:span text:style-name="NormalTok"><text:span text:style-name="T2"> <text:s text:c="3"/>id</text:span></text:span><text:span text:style-name="OperatorTok"><text:span text:style-name="T2">,</text:span></text:span><text:span text:style-name="T2"><text:line-break/></text:span><text:span text:style-name="NormalTok"><text:span text:style-name="T2"> <text:s text:c="3"/>name</text:span></text:span><text:span text:style-name="OperatorTok"><text:span text:style-name="T2">,</text:span></text:span><text:span text:style-name="T2"><text:line-break/></text:span><text:span text:style-name="NormalTok"><text:span text:style-name="T2"> <text:s text:c="3"/>price</text:span></text:span><text:span text:style-name="OperatorTok"><text:span text:style-name="T2">,</text:span></text:span><text:span text:style-name="T2"><text:line-break/></text:span><text:span text:style-name="NormalTok"><text:span text:style-name="T2"> <text:s text:c="3"/>img</text:span></text:span><text:span text:style-name="T2"><text:line-break/></text:span><text:span text:style-name="NormalTok"><text:span text:style-name="T2">}</text:span></text:span><text:span text:style-name="OperatorTok"><text:span text:style-name="T2">;</text:span></text:span></text:p>
      <text:p text:style-name="P4">Después:</text:p>
      <text:p text:style-name="Source_20_Code"><text:span text:style-name="NormalTok"><text:span text:style-name="T2">cart</text:span></text:span><text:span text:style-name="OperatorTok"><text:span text:style-name="T2">.</text:span></text:span><text:span text:style-name="FunctionTok"><text:span text:style-name="T2">push</text:span></text:span><text:span text:style-name="NormalTok"><text:span text:style-name="T2">(product)</text:span></text:span><text:span text:style-name="OperatorTok"><text:span text:style-name="T2">;</text:span></text:span><text:bookmark-end text:name="agregar-productos"/></text:p>
      <text:h text:style-name="P9" text:outline-level="2"><text:bookmark-start text:name="actualización-del-carrito"/>Actualización del carrito</text:h>
      <text:p text:style-name="First_20_Paragraph"><text:span text:style-name="T2">La función </text:span><text:span text:style-name="Verbatim_20_Char"><text:span text:style-name="T2">updateCartUI()</text:span></text:span><text:span text:style-name="T2">:</text:span></text:p>
      <text:list xml:id="list93709698742369" text:continue-list="list93708830179877" text:style-name="WWNum1009">
        <text:list-item>
          <text:p text:style-name="P16">Cuenta productos</text:p>
        </text:list-item>
        <text:list-item>
          <text:p text:style-name="P16">Genera HTML dinámico</text:p>
        </text:list-item>
        <text:list-item>
          <text:p text:style-name="P16">Calcula total</text:p>
        </text:list-item>
        <text:list-item>
          <text:p text:style-name="P16">Muestra productos<text:bookmark-end text:name="actualización-del-carrito"/></text:p>
        </text:list-item>
      </text:list>
      <text:h text:style-name="P9" text:outline-level="2"><text:bookmark-start text:name="eliminar-productos"/>Eliminar productos</text:h>
      <text:p text:style-name="P4">La función:</text:p>
      <text:p text:style-name="Source_20_Code"><text:span text:style-name="BuiltInTok"><text:span text:style-name="T2">window</text:span></text:span><text:span text:style-name="OperatorTok"><text:span text:style-name="T2">.</text:span></text:span><text:span text:style-name="AttributeTok"><text:span text:style-name="T2">removeFromCart</text:span></text:span><text:span text:style-name="NormalTok"><text:span text:style-name="T2"> </text:span></text:span><text:span text:style-name="OperatorTok"><text:span text:style-name="T2">=</text:span></text:span><text:span text:style-name="NormalTok"><text:span text:style-name="T2"> </text:span></text:span><text:span text:style-name="KeywordTok"><text:span text:style-name="T2">function</text:span></text:span><text:span text:style-name="NormalTok"><text:span text:style-name="T2">(index)</text:span></text:span></text:p>
      <text:p text:style-name="P4">Elimina elementos usando:</text:p>
      <text:p text:style-name="Source_20_Code"><text:span text:style-name="NormalTok"><text:span text:style-name="T2">cart</text:span></text:span><text:span text:style-name="OperatorTok"><text:span text:style-name="T2">.</text:span></text:span><text:span text:style-name="FunctionTok"><text:span text:style-name="T2">splice</text:span></text:span><text:span text:style-name="NormalTok"><text:span text:style-name="T2">(index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1</text:span></text:span><text:span text:style-name="NormalTok"><text:span text:style-name="T2">)</text:span></text:span><text:span text:style-name="OperatorTok"><text:span text:style-name="T2">;</text:span></text:span></text:p>
      <text:p text:style-name="P5"><text:bookmark-end text:name="carrito-de-compras"/><text:bookmark-end text:name="eliminar-productos"/></text:p>
      <text:h text:style-name="P1" text:outline-level="1"><text:bookmark-start text:name="formulario-con-validación"/>8. Formulario con Validación</text:h>
      <text:p text:style-name="P4">El formulario valida:</text:p>
      <text:list xml:id="list93708908799787" text:continue-list="list93709698742369" text:style-name="WWNum1010">
        <text:list-item>
          <text:p text:style-name="P17">Nombre</text:p>
        </text:list-item>
        <text:list-item>
          <text:p text:style-name="P17">Correo electrónico</text:p>
        </text:list-item>
        <text:list-item>
          <text:p text:style-name="P17">Teléfono</text:p>
        </text:list-item>
      </text:list>
      <text:h text:style-name="P9" text:outline-level="2"><text:bookmark-start text:name="expresiones-regulares-regex"/>Expresiones Regulares (Regex)</text:h>
      <text:h text:style-name="P18" text:outline-level="3"><text:bookmark-start text:name="nombre"/>Nombre</text:h>
      <text:p text:style-name="Source_20_Code"><text:span text:style-name="SpecialStringTok"><text:span text:style-name="T2">/</text:span></text:span><text:span text:style-name="SpecialCharTok"><text:span text:style-name="T2">^[A-Za-zÁÉÍÓÚáéíóúÑñ\s]{3,}$</text:span></text:span><text:span text:style-name="SpecialStringTok"><text:span text:style-name="T2">/</text:span></text:span></text:p>
      <text:p text:style-name="P4">Permite:</text:p>
      <text:list xml:id="list93709442982579" text:continue-list="list93708908799787" text:style-name="WWNum1011">
        <text:list-item>
          <text:p text:style-name="P19">Letras</text:p>
        </text:list-item>
        <text:list-item>
          <text:p text:style-name="P19">Espacios</text:p>
        </text:list-item>
        <text:list-item>
          <text:p text:style-name="P19">Mínimo 3 caracteres<text:bookmark-end text:name="nombre"/></text:p>
        </text:list-item>
      </text:list>
      <text:h text:style-name="P18" text:outline-level="3"><text:bookmark-start text:name="correo"/><text:soft-page-break/>Correo</text:h>
      <text:p text:style-name="Source_20_Code"><text:span text:style-name="SpecialStringTok"><text:span text:style-name="T2">/</text:span></text:span><text:span text:style-name="SpecialCharTok"><text:span text:style-name="T2">^[^\s@]+</text:span></text:span><text:span text:style-name="SpecialStringTok"><text:span text:style-name="T2">@</text:span></text:span><text:span text:style-name="SpecialCharTok"><text:span text:style-name="T2">[^\s@]+\.[^\s@]+$</text:span></text:span><text:span text:style-name="SpecialStringTok"><text:span text:style-name="T2">/</text:span></text:span></text:p>
      <text:p text:style-name="P4">Verifica formato válido de email.<text:bookmark-end text:name="correo"/></text:p>
      <text:h text:style-name="P18" text:outline-level="3"><text:bookmark-start text:name="teléfono"/>Teléfono</text:h>
      <text:p text:style-name="Source_20_Code"><text:span text:style-name="SpecialStringTok"><text:span text:style-name="T2">/</text:span></text:span><text:span text:style-name="SpecialCharTok"><text:span text:style-name="T2">^[0-9]{7,15}$</text:span></text:span><text:span text:style-name="SpecialStringTok"><text:span text:style-name="T2">/</text:span></text:span></text:p>
      <text:p text:style-name="P4">Permite entre 7 y 15 números.<text:bookmark-end text:name="expresiones-regulares-regex"/><text:bookmark-end text:name="teléfono"/></text:p>
      <text:h text:style-name="P9" text:outline-level="2"><text:bookmark-start text:name="validación-visual"/>Validación Visual</text:h>
      <text:p text:style-name="P4">JavaScript agrega clases:</text:p>
      <text:p text:style-name="Source_20_Code"><text:span text:style-name="FunctionTok"><text:span text:style-name="T2">.input-error</text:span></text:span><text:span text:style-name="T2"><text:line-break/></text:span><text:span text:style-name="FunctionTok"><text:span text:style-name="T2">.input-success</text:span></text:span></text:p>
      <text:p text:style-name="P4">Esto cambia el borde de color:</text:p>
      <text:list xml:id="list93709782978685" text:continue-list="list93709442982579" text:style-name="WWNum1012">
        <text:list-item>
          <text:p text:style-name="P20">Rojo = error</text:p>
        </text:list-item>
        <text:list-item>
          <text:p text:style-name="P20">Verde = correcto</text:p>
        </text:list-item>
      </text:list>
      <text:p text:style-name="P5"><text:bookmark-end text:name="formulario-con-validación"/><text:bookmark-end text:name="validación-visual"/></text:p>
      <text:h text:style-name="P1" text:outline-level="1"><text:bookmark-start text:name="reloj-digital-en-tiempo-real"/>9. Reloj Digital en Tiempo Real</text:h>
      <text:p text:style-name="P4">La función:</text:p>
      <text:p text:style-name="Source_20_Code"><text:span text:style-name="KeywordTok"><text:span text:style-name="T2">function</text:span></text:span><text:span text:style-name="NormalTok"><text:span text:style-name="T2"> </text:span></text:span><text:span text:style-name="FunctionTok"><text:span text:style-name="T2">updateClock</text:span></text:span><text:span text:style-name="NormalTok"><text:span text:style-name="T2">()</text:span></text:span></text:p>
      <text:p text:style-name="P4">Obtiene la hora actual:</text:p>
      <text:p text:style-name="Source_20_Code"><text:span text:style-name="KeywordTok"><text:span text:style-name="T2">const</text:span></text:span><text:span text:style-name="NormalTok"><text:span text:style-name="T2"> now </text:span></text:span><text:span text:style-name="OperatorTok"><text:span text:style-name="T2">=</text:span></text:span><text:span text:style-name="NormalTok"><text:span text:style-name="T2"> </text:span></text:span><text:span text:style-name="KeywordTok"><text:span text:style-name="T2">new</text:span></text:span><text:span text:style-name="NormalTok"><text:span text:style-name="T2"> </text:span></text:span><text:span text:style-name="BuiltInTok"><text:span text:style-name="T2">Date</text:span></text:span><text:span text:style-name="NormalTok"><text:span text:style-name="T2">()</text:span></text:span><text:span text:style-name="OperatorTok"><text:span text:style-name="T2">;</text:span></text:span></text:p>
      <text:p text:style-name="P4">Después:</text:p>
      <text:p text:style-name="Source_20_Code"><text:span text:style-name="NormalTok"><text:span text:style-name="T2">now</text:span></text:span><text:span text:style-name="OperatorTok"><text:span text:style-name="T2">.</text:span></text:span><text:span text:style-name="FunctionTok"><text:span text:style-name="T2">getHours</text:span></text:span><text:span text:style-name="NormalTok"><text:span text:style-name="T2">()</text:span></text:span><text:span text:style-name="T2"><text:line-break/></text:span><text:span text:style-name="NormalTok"><text:span text:style-name="T2">now</text:span></text:span><text:span text:style-name="OperatorTok"><text:span text:style-name="T2">.</text:span></text:span><text:span text:style-name="FunctionTok"><text:span text:style-name="T2">getMinutes</text:span></text:span><text:span text:style-name="NormalTok"><text:span text:style-name="T2">()</text:span></text:span><text:span text:style-name="T2"><text:line-break/></text:span><text:span text:style-name="NormalTok"><text:span text:style-name="T2">now</text:span></text:span><text:span text:style-name="OperatorTok"><text:span text:style-name="T2">.</text:span></text:span><text:span text:style-name="FunctionTok"><text:span text:style-name="T2">getSeconds</text:span></text:span><text:span text:style-name="NormalTok"><text:span text:style-name="T2">()</text:span></text:span></text:p>
      <text:p text:style-name="First_20_Paragraph"><text:span text:style-name="T2">El método </text:span><text:span text:style-name="Verbatim_20_Char"><text:span text:style-name="T2">padStart()</text:span></text:span><text:span text:style-name="T2"> agrega ceros:</text:span></text:p>
      <text:p text:style-name="Source_20_Code"><text:span text:style-name="BuiltInTok"><text:span text:style-name="T2">String</text:span></text:span><text:span text:style-name="NormalTok"><text:span text:style-name="T2">(now</text:span></text:span><text:span text:style-name="OperatorTok"><text:span text:style-name="T2">.</text:span></text:span><text:span text:style-name="FunctionTok"><text:span text:style-name="T2">getHours</text:span></text:span><text:span text:style-name="NormalTok"><text:span text:style-name="T2">())</text:span></text:span><text:span text:style-name="OperatorTok"><text:span text:style-name="T2">.</text:span></text:span><text:span text:style-name="FunctionTok"><text:span text:style-name="T2">padStart</text:span></text:span><text:span text:style-name="NormalTok"><text:span text:style-name="T2">(</text:span></text:span><text:span text:style-name="DecValTok"><text:span text:style-name="T2">2</text:span></text:span><text:span text:style-name="OperatorTok"><text:span text:style-name="T2">,</text:span></text:span><text:span text:style-name="NormalTok"><text:span text:style-name="T2"> </text:span></text:span><text:span text:style-name="StringTok"><text:span text:style-name="T2">'0'</text:span></text:span><text:span text:style-name="NormalTok"><text:span text:style-name="T2">)</text:span></text:span></text:p>
      <text:p text:style-name="P4">Finalmente:</text:p>
      <text:p text:style-name="Source_20_Code"><text:span text:style-name="NormalTok"><text:span text:style-name="T2">clockElement</text:span></text:span><text:span text:style-name="OperatorTok"><text:span text:style-name="T2">.</text:span></text:span><text:span text:style-name="AttributeTok"><text:span text:style-name="T2">textContent</text:span></text:span><text:span text:style-name="NormalTok"><text:span text:style-name="T2"> </text:span></text:span><text:span text:style-name="OperatorTok"><text:span text:style-name="T2">=</text:span></text:span><text:span text:style-name="NormalTok"><text:span text:style-name="T2"> </text:span></text:span><text:span text:style-name="VerbatimStringTok"><text:span text:style-name="T2">`</text:span></text:span><text:span text:style-name="SpecialCharTok"><text:span text:style-name="T2">${</text:span></text:span><text:span text:style-name="NormalTok"><text:span text:style-name="T2">hours</text:span></text:span><text:span text:style-name="SpecialCharTok"><text:span text:style-name="T2">}</text:span></text:span><text:span text:style-name="VerbatimStringTok"><text:span text:style-name="T2">:</text:span></text:span><text:span text:style-name="SpecialCharTok"><text:span text:style-name="T2">${</text:span></text:span><text:span text:style-name="NormalTok"><text:span text:style-name="T2">minutes</text:span></text:span><text:span text:style-name="SpecialCharTok"><text:span text:style-name="T2">}</text:span></text:span><text:span text:style-name="VerbatimStringTok"><text:span text:style-name="T2">:</text:span></text:span><text:span text:style-name="SpecialCharTok"><text:span text:style-name="T2">${</text:span></text:span><text:span text:style-name="NormalTok"><text:span text:style-name="T2">seconds</text:span></text:span><text:span text:style-name="SpecialCharTok"><text:span text:style-name="T2">}</text:span></text:span><text:span text:style-name="VerbatimStringTok"><text:span text:style-name="T2">`</text:span></text:span><text:span text:style-name="OperatorTok"><text:span text:style-name="T2">;</text:span></text:span></text:p>
      <text:p text:style-name="P4">El reloj se actualiza cada segundo:</text:p>
      <text:p text:style-name="Source_20_Code"><text:span text:style-name="PreprocessorTok"><text:span text:style-name="T2">setInterval</text:span></text:span><text:span text:style-name="NormalTok"><text:span text:style-name="T2">(updateClock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1000</text:span></text:span><text:span text:style-name="NormalTok"><text:span text:style-name="T2">)</text:span></text:span><text:span text:style-name="OperatorTok"><text:span text:style-name="T2">;</text:span></text:span></text:p>
      <text:p text:style-name="P5"><text:bookmark-end text:name="reloj-digital-en-tiempo-real"/></text:p>
      <text:h text:style-name="P1" text:outline-level="1"><text:bookmark-start text:name="scroll-infinito"/><text:soft-page-break/>10. Scroll Infinito</text:h>
      <text:p text:style-name="P4">El scroll infinito utiliza:</text:p>
      <text:p text:style-name="Source_20_Code"><text:span text:style-name="NormalTok"><text:span text:style-name="T2">IntersectionObserver</text:span></text:span></text:p>
      <text:h text:style-name="P9" text:outline-level="2"><text:bookmark-start text:name="objetivo"/>Objetivo</text:h>
      <text:p text:style-name="P4">Detectar cuándo el usuario llega al final de la sección.</text:p>
      <text:p text:style-name="P2">Cuando el spinner aparece en pantalla:</text:p>
      <text:p text:style-name="Source_20_Code"><text:span text:style-name="ControlFlowTok"><text:span text:style-name="T2">if</text:span></text:span><text:span text:style-name="NormalTok"><text:span text:style-name="T2"> (entries[</text:span></text:span><text:span text:style-name="DecValTok"><text:span text:style-name="T2">0</text:span></text:span><text:span text:style-name="NormalTok"><text:span text:style-name="T2">]</text:span></text:span><text:span text:style-name="OperatorTok"><text:span text:style-name="T2">.</text:span></text:span><text:span text:style-name="AttributeTok"><text:span text:style-name="T2">isIntersecting</text:span></text:span><text:span text:style-name="NormalTok"><text:span text:style-name="T2">)</text:span></text:span></text:p>
      <text:p text:style-name="P4">El sistema:</text:p>
      <text:list xml:id="list93710405613380" text:continue-list="list93709782978685" text:style-name="WWNum1013">
        <text:list-item>
          <text:p text:style-name="P21">Simula carga de API</text:p>
        </text:list-item>
        <text:list-item>
          <text:p text:style-name="P21">Genera nuevas noticias</text:p>
        </text:list-item>
        <text:list-item>
          <text:p text:style-name="P21">Inserta HTML dinámicamente</text:p>
        </text:list-item>
      </text:list>
      <text:p text:style-name="P4">Código:</text:p>
      <text:p text:style-name="Source_20_Code"><text:span text:style-name="NormalTok"><text:span text:style-name="T2">newsContainer</text:span></text:span><text:span text:style-name="OperatorTok"><text:span text:style-name="T2">.</text:span></text:span><text:span text:style-name="FunctionTok"><text:span text:style-name="T2">insertAdjacentHTML</text:span></text:span><text:span text:style-name="NormalTok"><text:span text:style-name="T2">(</text:span></text:span><text:span text:style-name="StringTok"><text:span text:style-name="T2">'beforeend'</text:span></text:span><text:span text:style-name="OperatorTok"><text:span text:style-name="T2">,</text:span></text:span><text:span text:style-name="NormalTok"><text:span text:style-name="T2"> </text:span></text:span><text:span text:style-name="FunctionTok"><text:span text:style-name="T2">generateNewsItems</text:span></text:span><text:span text:style-name="NormalTok"><text:span text:style-name="T2">())</text:span></text:span><text:span text:style-name="OperatorTok"><text:span text:style-name="T2">;</text:span></text:span></text:p>
      <text:p text:style-name="P4">También existe un límite:</text:p>
      <text:p text:style-name="Source_20_Code"><text:span text:style-name="ControlFlowTok"><text:span text:style-name="T2">if</text:span></text:span><text:span text:style-name="NormalTok"><text:span text:style-name="T2"> (newsCount </text:span></text:span><text:span text:style-name="OperatorTok"><text:span text:style-name="T2">&gt;</text:span></text:span><text:span text:style-name="NormalTok"><text:span text:style-name="T2"> </text:span></text:span><text:span text:style-name="DecValTok"><text:span text:style-name="T2">15</text:span></text:span><text:span text:style-name="NormalTok"><text:span text:style-name="T2">)</text:span></text:span></text:p>
      <text:p text:style-name="P4">Esto evita consumir demasiada memoria.</text:p>
      <text:p text:style-name="P5"><text:bookmark-end text:name="scroll-infinito"/><text:bookmark-end text:name="objetivo"/></text:p>
      <text:h text:style-name="P1" text:outline-level="1"><text:bookmark-start text:name="diseño-css-y-glassmorphism"/>11. Diseño CSS y Glassmorphism</text:h>
      <text:p text:style-name="First_20_Paragraph"><text:span text:style-name="T2">El archivo </text:span><text:span text:style-name="Verbatim_20_Char"><text:span text:style-name="T2">style.css</text:span></text:span><text:span text:style-name="T2"> implementa un diseño moderno basado en Glassmorphism.</text:span></text:p>
      <text:h text:style-name="P9" text:outline-level="2"><text:bookmark-start text:name="características-visuales"/>Características visuales</text:h>
      <text:list xml:id="list93709992664717" text:continue-list="list93710405613380" text:style-name="WWNum1014">
        <text:list-item>
          <text:p text:style-name="P22">Transparencias</text:p>
        </text:list-item>
        <text:list-item>
          <text:p text:style-name="P22">Desenfoque (blur)</text:p>
        </text:list-item>
        <text:list-item>
          <text:p text:style-name="P22">Sombras suaves</text:p>
        </text:list-item>
        <text:list-item>
          <text:p text:style-name="P22">Bordes translúcidos</text:p>
        </text:list-item>
        <text:list-item>
          <text:p text:style-name="P22">Gradientes</text:p>
        </text:list-item>
      </text:list>
      <text:p text:style-name="P4">Código principal:</text:p>
      <text:p text:style-name="Source_20_Code"><text:span text:style-name="FunctionTok"><text:span text:style-name="T2">.glass-panel</text:span></text:span><text:span text:style-name="NormalTok"><text:span text:style-name="T2"> {</text:span></text:span><text:span text:style-name="T2"><text:line-break/></text:span><text:span text:style-name="NormalTok"><text:span text:style-name="T2"> <text:s text:c="3"/></text:span></text:span><text:span text:style-name="KeywordTok"><text:span text:style-name="T2">background</text:span></text:span><text:span text:style-name="CharTok"><text:span text:style-name="T2">:</text:span></text:span><text:span text:style-name="NormalTok"><text:span text:style-name="T2"> </text:span></text:span><text:span text:style-name="FunctionTok"><text:span text:style-name="T2">rgba(</text:span></text:span><text:span text:style-name="DecValTok"><text:span text:style-name="T2">30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41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59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0.7</text:span></text:span><text:span text:style-name="FunctionTok"><text:span text:style-name="T2">)</text:span></text:span><text:span text:style-name="OperatorTok"><text:span text:style-name="T2">;</text:span></text:span><text:span text:style-name="T2"><text:line-break/></text:span><text:span text:style-name="NormalTok"><text:span text:style-name="T2"> <text:s text:c="3"/></text:span></text:span><text:span text:style-name="KeywordTok"><text:span text:style-name="T2">backdrop-filter</text:span></text:span><text:span text:style-name="CharTok"><text:span text:style-name="T2">:</text:span></text:span><text:span text:style-name="NormalTok"><text:span text:style-name="T2"> </text:span></text:span><text:span text:style-name="FunctionTok"><text:span text:style-name="T2">blur(</text:span></text:span><text:span text:style-name="DecValTok"><text:span text:style-name="T2">12</text:span></text:span><text:span text:style-name="DataTypeTok"><text:span text:style-name="T2">px</text:span></text:span><text:span text:style-name="FunctionTok"><text:span text:style-name="T2">)</text:span></text:span><text:span text:style-name="OperatorTok"><text:span text:style-name="T2">;</text:span></text:span><text:span text:style-name="T2"><text:line-break/></text:span><text:span text:style-name="NormalTok"><text:span text:style-name="T2">}</text:span></text:span></text:p>
      <text:p text:style-name="P5"><text:bookmark-end text:name="diseño-css-y-glassmorphism"/><text:bookmark-end text:name="características-visuales"/><text:soft-page-break/></text:p>
      <text:h text:style-name="P1" text:outline-level="1"><text:bookmark-start text:name="responsividad"/>12. Responsividad</text:h>
      <text:p text:style-name="P4">La página es responsive.</text:p>
      <text:p text:style-name="P2">Utiliza Media Queries:</text:p>
      <text:p text:style-name="Source_20_Code"><text:span text:style-name="ImportTok"><text:span text:style-name="T2">@media</text:span></text:span><text:span text:style-name="NormalTok"><text:span text:style-name="T2"> </text:span></text:span><text:span text:style-name="FunctionTok"><text:span text:style-name="T2">(</text:span></text:span><text:span text:style-name="KeywordTok"><text:span text:style-name="T2">max-width</text:span></text:span><text:span text:style-name="CharTok"><text:span text:style-name="T2">:</text:span></text:span><text:span text:style-name="NormalTok"><text:span text:style-name="T2"> </text:span></text:span><text:span text:style-name="DecValTok"><text:span text:style-name="T2">768</text:span></text:span><text:span text:style-name="DataTypeTok"><text:span text:style-name="T2">px</text:span></text:span><text:span text:style-name="FunctionTok"><text:span text:style-name="T2">)</text:span></text:span></text:p>
      <text:p text:style-name="P4">Cuando la pantalla es pequeña:</text:p>
      <text:list xml:id="list93710225077964" text:continue-list="list93709992664717" text:style-name="WWNum1015">
        <text:list-item>
          <text:p text:style-name="P23">Navbar cambia de disposición</text:p>
        </text:list-item>
        <text:list-item>
          <text:p text:style-name="P23">Sidebar ocupa todo el ancho</text:p>
        </text:list-item>
        <text:list-item>
          <text:p text:style-name="P23">Texto reduce tamaño</text:p>
        </text:list-item>
        <text:list-item>
          <text:p text:style-name="P23">Tabs se acomodan verticalmente</text:p>
        </text:list-item>
      </text:list>
      <text:p text:style-name="P5"><text:bookmark-end text:name="responsividad"/></text:p>
      <text:h text:style-name="P1" text:outline-level="1"><text:bookmark-start text:name="conceptos-importantes-aplicados"/>13. Conceptos Importantes Aplicados</text:h>
      <text:p text:style-name="P4">El proyecto aplica conceptos fundamentales de frontend:</text:p>
      <text:h text:style-name="P9" text:outline-level="2"><text:bookmark-start text:name="html-1"/>HTML</text:h>
      <text:list xml:id="list93710051146854" text:continue-list="list93710225077964" text:style-name="WWNum1016">
        <text:list-item>
          <text:p text:style-name="P24">Estructura semántica</text:p>
        </text:list-item>
        <text:list-item>
          <text:p text:style-name="P24">Formularios</text:p>
        </text:list-item>
        <text:list-item>
          <text:p text:style-name="P24">Navegación</text:p>
        </text:list-item>
        <text:list-item>
          <text:p text:style-name="P24">Multimedia<text:bookmark-end text:name="html-1"/></text:p>
        </text:list-item>
      </text:list>
      <text:h text:style-name="P9" text:outline-level="2"><text:bookmark-start text:name="css"/>CSS</text:h>
      <text:list xml:id="list93710596730794" text:continue-list="list93710051146854" text:style-name="WWNum1017">
        <text:list-item>
          <text:p text:style-name="P25">Flexbox</text:p>
        </text:list-item>
        <text:list-item>
          <text:p text:style-name="P25">Grid</text:p>
        </text:list-item>
        <text:list-item>
          <text:p text:style-name="P25">Variables CSS</text:p>
        </text:list-item>
        <text:list-item>
          <text:p text:style-name="P25">Animaciones</text:p>
        </text:list-item>
        <text:list-item>
          <text:p text:style-name="P25">Media Queries</text:p>
        </text:list-item>
        <text:list-item>
          <text:p text:style-name="P25">Glassmorphism<text:bookmark-end text:name="css"/></text:p>
        </text:list-item>
      </text:list>
      <text:h text:style-name="P9" text:outline-level="2"><text:bookmark-start text:name="javascript-1"/>JavaScript</text:h>
      <text:list xml:id="list93710210000448" text:continue-list="list93710596730794" text:style-name="WWNum1018">
        <text:list-item>
          <text:p text:style-name="P26">DOM</text:p>
        </text:list-item>
        <text:list-item>
          <text:p text:style-name="P26">Eventos</text:p>
        </text:list-item>
        <text:list-item>
          <text:p text:style-name="P26">Arrays</text:p>
        </text:list-item>
        <text:list-item>
          <text:p text:style-name="P26">Funciones</text:p>
        </text:list-item>
        <text:list-item>
          <text:p text:style-name="P26">Manipulación dinámica</text:p>
        </text:list-item>
        <text:list-item>
          <text:p text:style-name="P26">Validaciones</text:p>
        </text:list-item>
        <text:list-item>
          <text:p text:style-name="P26">IntersectionObserver</text:p>
        </text:list-item>
        <text:list-item>
          <text:p text:style-name="P26"><text:soft-page-break/>setInterval</text:p>
        </text:list-item>
      </text:list>
      <text:p text:style-name="P5"><text:bookmark-end text:name="conceptos-importantes-aplicados"/><text:bookmark-end text:name="javascript-1"/></text:p>
      <text:h text:style-name="P1" text:outline-level="1"><text:bookmark-start text:name="conclusión"/>Conclusión</text:h>
      <text:p text:style-name="P4">El proyecto TechFlow es una página moderna e interactiva que integra múltiples tecnologías frontend.</text:p>
      <text:p text:style-name="P2">Combina:</text:p>
      <text:list text:continue-list="list93710210000448" text:style-name="WWNum1019">
        <text:list-item>
          <text:p text:style-name="P27">Diseño moderno</text:p>
        </text:list-item>
        <text:list-item>
          <text:p text:style-name="P27">Animaciones</text:p>
        </text:list-item>
        <text:list-item>
          <text:p text:style-name="P27">Formularios dinámicos</text:p>
        </text:list-item>
        <text:list-item>
          <text:p text:style-name="P27">Validaciones</text:p>
        </text:list-item>
        <text:list-item>
          <text:p text:style-name="P27">Carrito de compras</text:p>
        </text:list-item>
        <text:list-item>
          <text:p text:style-name="P27">Modales</text:p>
        </text:list-item>
        <text:list-item>
          <text:p text:style-name="P27">Scroll infinito</text:p>
        </text:list-item>
        <text:list-item>
          <text:p text:style-name="P27">Responsive Design</text:p>
        </text:list-item>
      </text:list>
      <text:p text:style-name="P4">Es un excelente ejemplo práctico para aprender desarrollo web utilizando HTML, CSS y JavaScript.<text:bookmark-end text:name="conclusión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adea" svg:font-family="Calade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32:57</meta:creation-date>
    <dc:date>2026-05-21T09:37:08.207171670</dc:date>
    <meta:generator>LibreOffice/26.2.2.2$Linux_X86_64 LibreOffice_project/620$Build-2</meta:generator>
    <meta:editing-duration>PT9M50S</meta:editing-duration>
    <meta:editing-cycles>1</meta:editing-cycles>
    <meta:document-statistic meta:table-count="0" meta:image-count="0" meta:object-count="0" meta:page-count="9" meta:paragraph-count="214" meta:word-count="863" meta:character-count="5963" meta:non-whitespace-character-count="5354"/>
    <meta:user-defined meta:name="AppVersion">12.0000</meta:user-defined>
    <meta:template xlink:type="simple" xlink:actuate="onRequest" xlink:title="Normal.dotm" xlink:href=""/>
  </office:meta>
</office:document-meta>
</file>